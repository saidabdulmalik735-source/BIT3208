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A50000014ABFD5C70F.png" manifest:media-type="image/png"/>
  <manifest:file-entry manifest:full-path="Pictures/10000000000003B9000001F5CD106A04.png" manifest:media-type="image/png"/>
  <manifest:file-entry manifest:full-path="Pictures/10000000000003B70000029F3D7CBE04.png" manifest:media-type="image/png"/>
  <manifest:file-entry manifest:full-path="Pictures/10000000000003A90000029E8E904996.png" manifest:media-type="image/png"/>
  <manifest:file-entry manifest:full-path="Pictures/100000000000035A000002BACCCCC454.png" manifest:media-type="image/png"/>
  <manifest:file-entry manifest:full-path="Pictures/100000000000055400000226A93F3C6B.png" manifest:media-type="image/png"/>
  <manifest:file-entry manifest:full-path="Pictures/10000000000003620000026C49E42D24.png" manifest:media-type="image/png"/>
  <manifest:file-entry manifest:full-path="Pictures/10000000000002A6000001CF826364CF.png" manifest:media-type="image/png"/>
  <manifest:file-entry manifest:full-path="Pictures/1000000000000522000002C97348388D.png" manifest:media-type="image/png"/>
  <manifest:file-entry manifest:full-path="Pictures/1000000000000237000001E3F788C253.png" manifest:media-type="image/png"/>
  <manifest:file-entry manifest:full-path="Pictures/10000000000004A0000002290137BF54.png" manifest:media-type="image/png"/>
  <manifest:file-entry manifest:full-path="Pictures/100000000000051A0000017FB2E3AC50.png" manifest:media-type="image/png"/>
  <manifest:file-entry manifest:full-path="Pictures/10000000000003B60000014E73D69238.png" manifest:media-type="image/png"/>
  <manifest:file-entry manifest:full-path="Pictures/10000000000002BE000001DD8D2F1438.png" manifest:media-type="image/png"/>
  <manifest:file-entry manifest:full-path="Pictures/10000000000005200000016B585E3A67.png" manifest:media-type="image/png"/>
  <manifest:file-entry manifest:full-path="Pictures/100000000000051D000002C3C076444B.png" manifest:media-type="image/png"/>
  <manifest:file-entry manifest:full-path="Pictures/100000000000039200000179F7903099.png" manifest:media-type="image/png"/>
  <manifest:file-entry manifest:full-path="Pictures/10000000000001DB000002908662F51E.png" manifest:media-type="image/png"/>
  <manifest:file-entry manifest:full-path="Pictures/10000000000003470000023EEE4ED502.png" manifest:media-type="image/png"/>
  <manifest:file-entry manifest:full-path="Pictures/100000000000051E000002A7CCD81448.png" manifest:media-type="image/png"/>
  <manifest:file-entry manifest:full-path="Pictures/100000000000042C00000252FE86C47E.png" manifest:media-type="image/png"/>
  <manifest:file-entry manifest:full-path="Pictures/10000000000003270000029312D65AB4.png" manifest:media-type="image/png"/>
  <manifest:file-entry manifest:full-path="Pictures/10000000000001880000023F89450632.png" manifest:media-type="image/png"/>
  <manifest:file-entry manifest:full-path="Pictures/100000000000051E000002C881797837.png" manifest:media-type="image/png"/>
  <manifest:file-entry manifest:full-path="Pictures/1000000000000524000002CEC2692D0A.png" manifest:media-type="image/png"/>
  <manifest:file-entry manifest:full-path="Pictures/1000000000000174000001A06758042E.png" manifest:media-type="image/png"/>
  <manifest:file-entry manifest:full-path="Pictures/10000000000002DC000002BFBCCBD7A6.png" manifest:media-type="image/png"/>
  <manifest:file-entry manifest:full-path="Pictures/1000000000000549000002E3D6916E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text-properties fo:font-weight="bold" officeooo:paragraph-rsid="00041d29" style:font-weight-asian="bold" style:font-weight-complex="bold"/>
    </style:style>
    <style:style style:name="P2" style:family="paragraph" style:parent-style-name="Standard">
      <style:text-properties fo:font-size="16pt" fo:font-weight="bold" officeooo:rsid="00041d29" officeooo:paragraph-rsid="00041d29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2pt" fo:font-weight="bold" officeooo:rsid="00041d29" officeooo:paragraph-rsid="00041d29" style:font-size-asian="10.5pt" style:font-weight-asian="bold" style:font-size-complex="12pt" style:font-weight-complex="bold"/>
    </style:style>
    <style:style style:name="P4" style:family="paragraph" style:parent-style-name="Standard">
      <style:text-properties officeooo:paragraph-rsid="00041d29"/>
    </style:style>
    <style:style style:name="P5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8" style:family="paragraph" style:parent-style-name="Standard" style:list-style-name="">
      <style:paragraph-properties fo:margin-top="0.1945in" fo:margin-bottom="0.1945in" style:contextual-spacing="false" fo:line-height="100%"/>
      <style:text-properties officeooo:paragraph-rsid="00041d29"/>
    </style:style>
    <style:style style:name="P9" style:family="paragraph" style:parent-style-name="Standard" style:list-style-name="">
      <style:paragraph-properties fo:margin-top="0.1945in" fo:margin-bottom="0.1945in" style:contextual-spacing="false" fo:line-height="100%"/>
      <style:text-properties officeooo:paragraph-rsid="0007204c"/>
    </style:style>
    <style:style style:name="P10" style:family="paragraph" style:parent-style-name="Standard" style:list-style-name="">
      <style:paragraph-properties fo:margin-top="0.1945in" fo:margin-bottom="0.1945in" style:contextual-spacing="false" fo:line-height="100%"/>
      <style:text-properties officeooo:paragraph-rsid="00041d29"/>
    </style:style>
    <style:style style:name="P11" style:family="paragraph" style:parent-style-name="Standard" style:list-style-name="">
      <style:paragraph-properties fo:margin-top="0.1945in" fo:margin-bottom="0.1945in" style:contextual-spacing="false" fo:line-height="100%"/>
      <style:text-properties officeooo:paragraph-rsid="00041d29"/>
    </style:style>
    <style:style style:name="P12" style:family="paragraph" style:parent-style-name="Standard" style:list-style-name="">
      <style:paragraph-properties fo:margin-top="0.1945in" fo:margin-bottom="0.1945in" style:contextual-spacing="false" fo:line-height="100%"/>
      <style:text-properties officeooo:paragraph-rsid="000c13fd"/>
    </style:style>
    <style:style style:name="P13" style:family="paragraph" style:parent-style-name="Standard" style:list-style-name="">
      <style:paragraph-properties fo:margin-top="0.1945in" fo:margin-bottom="0.1945in" style:contextual-spacing="false" fo:line-height="100%"/>
      <style:text-properties officeooo:paragraph-rsid="000ef12b"/>
    </style:style>
    <style:style style:name="P14" style:family="paragraph" style:parent-style-name="Standard" style:list-style-name="">
      <style:paragraph-properties fo:margin-top="0.1945in" fo:margin-bottom="0.1945in" style:contextual-spacing="false" fo:line-height="100%"/>
      <style:text-properties officeooo:paragraph-rsid="000fb93e"/>
    </style:style>
    <style:style style:name="P15" style:family="paragraph" style:parent-style-name="Standard" style:list-style-name="WWNum2">
      <style:paragraph-properties fo:margin-top="0in" fo:margin-bottom="0in" style:contextual-spacing="false" fo:line-height="100%"/>
      <style:text-properties officeooo:paragraph-rsid="00041d29"/>
    </style:style>
    <style:style style:name="P16" style:family="paragraph" style:parent-style-name="Standard" style:list-style-name="WWNum2">
      <style:paragraph-properties fo:margin-top="0in" fo:margin-bottom="0.1945in" style:contextual-spacing="false" fo:line-height="100%"/>
      <style:text-properties officeooo:paragraph-rsid="00041d29"/>
    </style:style>
    <style:style style:name="P17" style:family="paragraph" style:parent-style-name="Standard">
      <style:paragraph-properties fo:margin-top="0.1945in" fo:margin-bottom="0in" style:contextual-spacing="false" fo:line-height="100%"/>
      <style:text-properties officeooo:paragraph-rsid="00041d29"/>
    </style:style>
    <style:style style:name="P18" style:family="paragraph" style:parent-style-name="Standard">
      <style:paragraph-properties fo:margin-top="0.1945in" fo:margin-bottom="0.1945in" style:contextual-spacing="false" fo:line-height="100%"/>
      <style:text-properties officeooo:paragraph-rsid="00041d29"/>
    </style:style>
    <style:style style:name="P19" style:family="paragraph" style:parent-style-name="Standard" style:list-style-name="WWNum2">
      <style:paragraph-properties fo:margin-top="0.1945in" fo:margin-bottom="0in" style:contextual-spacing="false" fo:line-height="100%"/>
      <style:text-properties fo:font-weight="bold" officeooo:paragraph-rsid="00041d29" style:font-weight-asian="bold" style:font-weight-complex="bold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paragraph-rsid="00041d29" style:font-name-asian="Times New Roman1" style:font-size-asian="12pt" style:font-name-complex="Times New Roman1" style:font-size-complex="12pt"/>
    </style:style>
    <style:style style:name="P21" style:family="paragraph" style:parent-style-name="Standard" style:list-style-name="">
      <style:paragraph-properties fo:margin-top="0.1945in" fo:margin-bottom="0.1945in" style:contextual-spacing="false" fo:line-height="100%"/>
      <style:text-properties style:font-name="Times New Roman" fo:font-size="12pt" fo:font-weight="normal" officeooo:rsid="0007204c" officeooo:paragraph-rsid="0007204c" style:font-name-asian="Times New Roman1" style:font-size-asian="12pt" style:font-weight-asian="normal" style:font-name-complex="Times New Roman1" style:font-size-complex="12pt" style:font-weight-complex="normal"/>
    </style:style>
    <style:style style:name="P22" style:family="paragraph" style:parent-style-name="Standard">
      <style:paragraph-properties fo:margin-top="0in" fo:margin-bottom="0.1945in" style:contextual-spacing="false" fo:line-height="100%"/>
      <style:text-properties officeooo:rsid="000eddb5" officeooo:paragraph-rsid="000eddb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6e172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7204c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08d7f0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0b82d5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font-weight="normal" officeooo:rsid="00041d29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font-weight="normal" style:letter-kerning="true" style:font-name-asian="Times New Roman1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0" style:family="text">
      <style:text-properties style:font-name="Times New Roman" fo:font-weight="normal" style:font-name-asian="Times New Roman1" style:font-size-asian="12pt" style:font-weight-asian="normal" style:font-name-complex="Times New Roman1" style:font-weight-complex="normal"/>
    </style:style>
    <style:style style:name="T11" style:family="text">
      <style:text-properties style:font-name="Times New Roman" fo:font-weight="normal" officeooo:rsid="00041d29" style:font-name-asian="Times New Roman1" style:font-size-asian="12pt" style:font-weight-asian="normal" style:font-name-complex="Times New Roman1" style:font-weight-complex="normal"/>
    </style:style>
    <style:style style:name="T12" style:family="text">
      <style:text-properties style:font-name="Times New Roman" fo:font-weight="bold" style:font-name-asian="Times New Roman1" style:font-size-asian="12pt" style:font-weight-asian="bold" style:font-name-complex="Times New Roman1" style:font-weight-complex="bold"/>
    </style:style>
    <style:style style:name="T13" style:family="text">
      <style:text-properties style:font-name="Times New Roman" style:font-name-asian="Times New Roman1" style:font-size-asian="12pt" style:font-name-complex="Times New Roman1"/>
    </style:style>
    <style:style style:name="T14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15" style:family="text"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T16" style:family="text">
      <style:text-properties style:font-name="Times New Roman" fo:font-size="24pt" fo:font-weight="bold" officeooo:rsid="00041d29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T17" style:family="text">
      <style:text-properties style:font-name="Times New Roman" fo:font-size="13.5pt" fo:font-weight="bold" style:font-name-asian="Times New Roman1" style:font-size-asian="13.5pt" style:font-weight-asian="bold" style:font-name-complex="Times New Roman1" style:font-size-complex="13.5pt" style:font-weight-complex="bold"/>
    </style:style>
    <style:style style:name="T18" style:family="text">
      <style:text-properties style:font-name="Times New Roman" fo:font-size="13.5pt" fo:font-weight="bold" officeooo:rsid="0004788c" style:font-name-asian="Times New Roman1" style:font-size-asian="13.5pt" style:font-weight-asian="bold" style:font-name-complex="Times New Roman1" style:font-size-complex="13.5pt" style:font-weight-complex="bold"/>
    </style:style>
    <style:style style:name="T19" style:family="text">
      <style:text-properties style:font-name="Times New Roman" fo:font-size="13.5pt" fo:font-weight="bold" officeooo:rsid="00041d29" style:letter-kerning="true" style:font-name-asian="Times New Roman1" style:font-size-asian="13.5pt" style:font-weight-asian="bold" style:font-name-complex="Times New Roman1" style:font-size-complex="13.5pt" style:font-weight-complex="bold"/>
    </style:style>
    <style:style style:name="T20" style:family="text">
      <style:text-properties style:font-name="Times New Roman" fo:font-size="13.5pt" fo:font-weight="bold" officeooo:rsid="000c13fd" style:letter-kerning="true" style:font-name-asian="Times New Roman1" style:font-size-asian="13.5pt" style:font-weight-asian="bold" style:font-name-complex="Times New Roman1" style:font-size-complex="13.5pt" style:font-weight-complex="bold"/>
    </style:style>
    <style:style style:name="T21" style:family="text">
      <style:text-properties fo:font-size="12pt" fo:font-weight="bold" officeooo:rsid="00041d29" style:font-size-asian="10.5pt" style:font-weight-asian="bold" style:font-size-complex="12pt" style:font-weight-complex="bold"/>
    </style:style>
    <style:style style:name="T22" style:family="text">
      <style:text-properties fo:font-size="12pt" fo:font-weight="normal" officeooo:rsid="00041d29" style:font-size-asian="10.5pt" style:font-weight-asian="normal" style:font-size-complex="12pt" style:font-weight-complex="normal"/>
    </style:style>
    <style:style style:name="T23" style:family="text">
      <style:text-properties fo:font-size="24pt" fo:font-weight="bold" officeooo:rsid="00041d29" style:letter-kerning="true" style:font-size-asian="24pt" style:font-weight-asian="bold" style:font-size-complex="24pt" style:font-weight-complex="bold"/>
    </style:style>
    <style:style style:name="T24" style:family="text">
      <style:text-properties fo:font-size="24pt" fo:font-weight="bold" officeooo:rsid="000b82d5" style:letter-kerning="true" style:font-size-asian="24pt" style:font-weight-asian="bold" style:font-size-complex="24pt" style:font-weight-complex="bold"/>
    </style:style>
    <style:style style:name="T25" style:family="text">
      <style:text-properties fo:font-size="24pt" fo:font-weight="bold" officeooo:rsid="000eddb5" style:letter-kerning="true" style:font-size-asian="24pt" style:font-weight-asian="bold" style:font-size-complex="24pt" style:font-weight-complex="bold"/>
    </style:style>
    <style:style style:name="T26" style:family="text">
      <style:text-properties fo:font-size="24pt" fo:font-weight="bold" officeooo:rsid="000ef12b" style:letter-kerning="true" style:font-size-asian="24pt" style:font-weight-asian="bold" style:font-size-complex="24pt" style:font-weight-complex="bold"/>
    </style:style>
    <style:style style:name="T27" style:family="text">
      <style:text-properties fo:font-size="24pt" officeooo:rsid="00041d29" style:letter-kerning="true" style:font-size-asian="24pt" style:font-size-complex="24pt"/>
    </style:style>
    <style:style style:name="T28" style:family="text">
      <style:text-properties fo:font-size="13.5pt" fo:font-weight="bold" officeooo:rsid="000c13fd" style:letter-kerning="true" style:font-size-asian="13.5pt" style:font-weight-asian="bold" style:font-size-complex="13.5pt" style:font-weight-complex="bold"/>
    </style:style>
    <style:style style:name="T29" style:family="text">
      <style:text-properties fo:font-size="13.5pt" fo:font-weight="bold" officeooo:rsid="000dfade" style:letter-kerning="true" style:font-size-asian="13.5pt" style:font-weight-asian="bold" style:font-size-complex="13.5pt" style:font-weight-complex="bold"/>
    </style:style>
    <style:style style:name="T30" style:family="text">
      <style:text-properties fo:font-size="13.5pt" fo:font-weight="bold" officeooo:rsid="000eddb5" style:letter-kerning="true" style:font-size-asian="13.5pt" style:font-weight-asian="bold" style:font-size-complex="13.5pt" style:font-weight-complex="bold"/>
    </style:style>
    <style:style style:name="T31" style:family="text">
      <style:text-properties fo:font-size="13.5pt" fo:font-weight="bold" officeooo:rsid="000ef12b" style:letter-kerning="true" style:font-size-asian="13.5pt" style:font-weight-asian="bold" style:font-size-complex="13.5pt" style:font-weight-complex="bold"/>
    </style:style>
    <style:style style:name="T32" style:family="text">
      <style:text-properties fo:font-size="13.5pt" fo:font-weight="bold" officeooo:rsid="000fb93e" style:letter-kerning="true" style:font-size-asian="13.5pt" style:font-weight-asian="bold" style:font-size-complex="13.5pt" style:font-weight-complex="bold"/>
    </style:style>
    <style:style style:name="T33" style:family="text">
      <style:text-properties fo:font-size="13.5pt" fo:font-weight="bold" officeooo:rsid="0010c189" style:letter-kerning="true" style:font-size-asian="13.5pt" style:font-weight-asian="bold" style:font-size-complex="13.5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UDENT DETAILS</text:p>
      <text:p text:style-name="P3">NAME : <text:span text:style-name="T1">ABDULMALIK HAMED<text:line-break/></text:span></text:p>
      <text:p text:style-name="P3">ADM NO. : <text:span text:style-name="T1">BSCCS/2024/33590</text:span></text:p>
      <text:p text:style-name="P4"><text:span text:style-name="T21"/></text:p>
      <text:p text:style-name="P4"><text:span text:style-name="T21">COURSE/CLASS : </text:span><text:span text:style-name="T22"><text:s/>COMPUTER SCIENCE JAN 24</text:span></text:p>
      <text:p text:style-name="P4"><text:span text:style-name="T12"/></text:p>
      <text:p text:style-name="P4"><text:span text:style-name="T12">Unit Name:</text:span><text:span text:style-name="T10"> Advanced Web Design and Development</text:span></text:p>
      <text:p text:style-name="P1"><text:span text:style-name="T2"/></text:p>
      <text:p text:style-name="P1"><text:span text:style-name="T2">Lecturer Name : </text:span><text:span text:style-name="T7">MICHAEL NYORO</text:span></text:p>
      <text:p text:style-name="P1"><text:span text:style-name="T13"/></text:p>
      <text:p text:style-name="P1"><text:span text:style-name="T13">Semester/Academic Year : </text:span><text:span text:style-name="T11">YEAR 4 SEM 2</text:span></text:p>
      <text:p text:style-name="P1"><text:span text:style-name="T11"/></text:p>
      <text:h text:style-name="P8" text:outline-level="2" loext:marker-style-name="T14"><text:bookmark-start text:name="__RefHeading___Toc5592_2625077907"/><text:span text:style-name="T14">Project Details</text:span><text:bookmark-end text:name="__RefHeading___Toc5592_2625077907"/></text:h>
      <text:list text:style-name="WWNum2">
        <text:list-item>
          <text:p text:style-name="P19" loext:marker-style-name="T2"><text:span text:style-name="T2">Project Title : </text:span><text:span text:style-name="T5">ShopMart</text:span><text:span text:style-name="T2"> <text:s/></text:span></text:p>
        </text:list-item>
        <text:list-item>
          <text:p text:style-name="P15" loext:marker-style-name="T2"><text:span text:style-name="T9">Selected Technologies;</text:span></text:p>
          <text:list>
            <text:list-item>
              <text:p text:style-name="P15" loext:marker-style-name="T2"><text:span text:style-name="T2">PHP + MySQL</text:span></text:p>
            </text:list-item>
            <text:list-item>
              <text:p text:style-name="P15" loext:marker-style-name="T2"><text:span text:style-name="T2">MEVN Stack</text:span></text:p>
            </text:list-item>
            <text:list-item>
              <text:p text:style-name="P15" loext:marker-style-name="T2"><text:span text:style-name="T2">Laravel</text:span></text:p>
            </text:list-item>
            <text:list-item>
              <text:p text:style-name="P16" loext:marker-style-name="T2"><text:span text:style-name="T2">React + Firebase</text:span></text:p>
            </text:list-item>
          </text:list>
        </text:list-item>
      </text:list>
      <text:h text:style-name="P8" text:outline-level="2" loext:marker-style-name="T14"><text:span text:style-name="T14"/></text:h>
      <text:h text:style-name="P8" text:outline-level="2" loext:marker-style-name="T14"><text:bookmark-start text:name="__RefHeading___Toc5594_2625077907"/><text:span text:style-name="T14">GitHub Link</text:span><text:bookmark-end text:name="__RefHeading___Toc5594_2625077907"/></text:h>
      <text:p text:style-name="P17" loext:marker-style-name="T2"><text:a xlink:type="simple" xlink:href="https://github.com/saidabdulmalik735-source" text:style-name="Internet_20_link" text:visited-style-name="Visited_20_Internet_20_Link"><text:span text:style-name="T7">https://github.com/saidabdulmalik735-source</text:span></text:a></text:p>
      <text:p text:style-name="P17" loext:marker-style-name="T2"><text:span text:style-name="T16"/></text:p>
      <text:p text:style-name="P17" loext:marker-style-name="T2"><text:span text:style-name="T16"/></text:p>
      <text:p text:style-name="P17" loext:marker-style-name="T2"><text:span text:style-name="T16"/></text:p>
      <text:p text:style-name="P17" loext:marker-style-name="T2"><text:span text:style-name="T16"/></text:p>
      <text:p text:style-name="P17" loext:marker-style-name="T2"><text:span text:style-name="T16"/></text:p>
      <text:p text:style-name="P17" loext:marker-style-name="T2"><text:bookmark text:name="__RefHeading___Toc5596_2625077907"/><text:span text:style-name="T1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Table of Contents</text:p>
          </text:index-title>
          <text:p text:style-name="P6"><text:a xlink:type="simple" xlink:href="#__RefHeading___Toc5592_2625077907" text:style-name="Index_20_Link" text:visited-style-name="Index_20_Link">Project Details<text:tab/>1</text:a></text:p>
          <text:p text:style-name="P6"><text:a xlink:type="simple" xlink:href="#__RefHeading___Toc5594_2625077907" text:style-name="Index_20_Link" text:visited-style-name="Index_20_Link">GitHub Link<text:tab/>1</text:a></text:p>
          <text:p text:style-name="P5"><text:a xlink:type="simple" xlink:href="#__RefHeading___Toc5598_2625077907" text:style-name="Index_20_Link" text:visited-style-name="Index_20_Link">Week 1: Local Environment Setup<text:tab/>3</text:a></text:p>
          <text:p text:style-name="P6"><text:a xlink:type="simple" xlink:href="#__RefHeading___Toc5686_2625077907" text:style-name="Index_20_Link" text:visited-style-name="Index_20_Link">Title : Installation and Testing of Local Development Environment<text:tab/>3</text:a></text:p>
          <text:p text:style-name="P6"><text:a xlink:type="simple" xlink:href="#__RefHeading___Toc5604_2625077907" text:style-name="Index_20_Link" text:visited-style-name="Index_20_Link">Required Evidence<text:tab/>3</text:a></text:p>
          <text:p text:style-name="P7"><text:a xlink:type="simple" xlink:href="#__RefHeading___Toc5606_2625077907" text:style-name="Index_20_Link" text:visited-style-name="Index_20_Link">Fig 1: Installation of XAMPP<text:tab/>3</text:a></text:p>
          <text:p text:style-name="P7"><text:a xlink:type="simple" xlink:href="#__RefHeading___Toc5608_2625077907" text:style-name="Index_20_Link" text:visited-style-name="Index_20_Link">Fig 2: Apache and MySQL Running<text:tab/>4</text:a></text:p>
          <text:p text:style-name="P7"><text:a xlink:type="simple" xlink:href="#__RefHeading___Toc5610_2625077907" text:style-name="Index_20_Link" text:visited-style-name="Index_20_Link">Fig 3: Localhost Test Page<text:tab/>4</text:a></text:p>
          <text:p text:style-name="P7"><text:a xlink:type="simple" xlink:href="#__RefHeading___Toc5612_2625077907" text:style-name="Index_20_Link" text:visited-style-name="Index_20_Link">Fig 4: Database Connection Test<text:tab/>4</text:a></text:p>
          <text:p text:style-name="P6"><text:a xlink:type="simple" xlink:href="#__RefHeading___Toc5614_2625077907" text:style-name="Index_20_Link" text:visited-style-name="Index_20_Link">I learnt XAMPP doesn’t easily recognise spacing in naming folders or files. The technologies used was html and sql.<text:tab/>5</text:a></text:p>
          <text:p text:style-name="P5"><text:a xlink:type="simple" xlink:href="#__RefHeading___Toc5616_2625077907" text:style-name="Index_20_Link" text:visited-style-name="Index_20_Link">Week 2: Wireframes and GUI Design<text:tab/>5</text:a></text:p>
          <text:p text:style-name="P6"><text:a xlink:type="simple" xlink:href="#__RefHeading___Toc5690_2625077907" text:style-name="Index_20_Link" text:visited-style-name="Index_20_Link">Title : User Interface Planning and System Design<text:tab/>5</text:a></text:p>
          <text:p text:style-name="P6"><text:a xlink:type="simple" xlink:href="#__RefHeading___Toc5622_2625077907" text:style-name="Index_20_Link" text:visited-style-name="Index_20_Link">Required Evidence<text:tab/>5</text:a></text:p>
          <text:p text:style-name="P7"><text:a xlink:type="simple" xlink:href="#__RefHeading___Toc5624_2625077907" text:style-name="Index_20_Link" text:visited-style-name="Index_20_Link">Fig 1: Hand-drawn Wireframe<text:tab/>5</text:a></text:p>
          <text:p text:style-name="P7"><text:a xlink:type="simple" xlink:href="#__RefHeading___Toc5626_2625077907" text:style-name="Index_20_Link" text:visited-style-name="Index_20_Link">Fig 2: Dashboard Layout Design<text:tab/>6</text:a></text:p>
          <text:p text:style-name="P7"><text:a xlink:type="simple" xlink:href="#__RefHeading___Toc5628_2625077907" text:style-name="Index_20_Link" text:visited-style-name="Index_20_Link">Fig 3: Mobile View Mockup<text:tab/>7</text:a></text:p>
          <text:p text:style-name="P7"><text:a xlink:type="simple" xlink:href="#__RefHeading___Toc5630_2625077907" text:style-name="Index_20_Link" text:visited-style-name="Index_20_Link">Fig 4: Color Theme and Navigation Structure<text:tab/>7</text:a></text:p>
          <text:p text:style-name="P7"><text:a xlink:type="simple" xlink:href="#__RefHeading___Toc5632_2625077907" text:style-name="Index_20_Link" text:visited-style-name="Index_20_Link">Fig 5: GUI Prototype in Figma<text:tab/>8</text:a></text:p>
          <text:p text:style-name="P6"><text:a xlink:type="simple" xlink:href="#__RefHeading___Toc5634_2625077907" text:style-name="Index_20_Link" text:visited-style-name="Index_20_Link">Student Reflection<text:tab/>8</text:a></text:p>
          <text:p text:style-name="P6"><text:a xlink:type="simple" xlink:href="#__RefHeading___Toc5636_2625077907" text:style-name="Index_20_Link" text:visited-style-name="Index_20_Link">The design was selected due its simplicity and easy to use navigations. User experience was considered through easy naviagtion buttons and quick action buttons that guide the user.<text:tab/>8</text:a></text:p>
          <text:p text:style-name="P6"><text:a xlink:type="simple" xlink:href="#__RefHeading___Toc5638_2625077907" text:style-name="Index_20_Link" text:visited-style-name="Index_20_Link"><text:s/>Navigation flow was planned based on user experience and quick product selection and check out. Intended system users will be prospective customers<text:tab/>8</text:a></text:p>
          <text:p text:style-name="P5"><text:a xlink:type="simple" xlink:href="#__RefHeading___Toc5640_2625077907" text:style-name="Index_20_Link" text:visited-style-name="Index_20_Link">Week 3: JavaScript and PHP Basics<text:tab/>8</text:a></text:p>
          <text:p text:style-name="P6"><text:a xlink:type="simple" xlink:href="#__RefHeading___Toc5688_2625077907" text:style-name="Index_20_Link" text:visited-style-name="Index_20_Link">Title : Frontend Interaction and Backend Foundations<text:tab/>8</text:a></text:p>
          <text:p text:style-name="P6"><text:a xlink:type="simple" xlink:href="#__RefHeading___Toc5646_2625077907" text:style-name="Index_20_Link" text:visited-style-name="Index_20_Link">Required Evidence<text:tab/>8</text:a></text:p>
          <text:p text:style-name="P7"><text:a xlink:type="simple" xlink:href="#__RefHeading___Toc5648_2625077907" text:style-name="Index_20_Link" text:visited-style-name="Index_20_Link">Fig 1: JavaScript Form Validation<text:tab/>8</text:a></text:p>
          <text:p text:style-name="P7"><text:a xlink:type="simple" xlink:href="#__RefHeading___Toc5650_2625077907" text:style-name="Index_20_Link" text:visited-style-name="Index_20_Link">Fig 2: Password Strength Checker<text:tab/>9</text:a></text:p>
          <text:p text:style-name="P7"><text:a xlink:type="simple" xlink:href="#__RefHeading___Toc5652_2625077907" text:style-name="Index_20_Link" text:visited-style-name="Index_20_Link">Fig 3: PHP Syntax Practice<text:tab/>10</text:a></text:p>
          <text:p text:style-name="P7"><text:a xlink:type="simple" xlink:href="#__RefHeading___Toc5654_2625077907" text:style-name="Index_20_Link" text:visited-style-name="Index_20_Link">Fig 4: Database Connection Script<text:tab/>11</text:a></text:p>
          <text:p text:style-name="P7"><text:a xlink:type="simple" xlink:href="#__RefHeading___Toc5656_2625077907" text:style-name="Index_20_Link" text:visited-style-name="Index_20_Link">Fig 5: Dynamic User Input Handling<text:tab/>11</text:a></text:p>
          <text:p text:style-name="P6"><text:a xlink:type="simple" xlink:href="#__RefHeading___Toc5658_2625077907" text:style-name="Index_20_Link" text:visited-style-name="Index_20_Link">Student Reflection<text:tab/>12</text:a></text:p>
          <text:p text:style-name="P5"><text:a xlink:type="simple" xlink:href="#__RefHeading___Toc5660_2625077907" text:style-name="Index_20_Link" text:visited-style-name="Index_20_Link">Week 4: Server-Side Components.<text:tab/>12</text:a></text:p>
          <text:p text:style-name="P7"><text:a xlink:type="simple" xlink:href="#__RefHeading___Toc5662_2625077907" text:style-name="Index_20_Link" text:visited-style-name="Index_20_Link">Fig 1. Login form<text:tab/>13</text:a></text:p>
          <text:p text:style-name="P7"><text:a xlink:type="simple" xlink:href="#__RefHeading___Toc5664_2625077907" text:style-name="Index_20_Link" text:visited-style-name="Index_20_Link">Fig 2. Admin dashboard<text:tab/>13</text:a></text:p>
          <text:p text:style-name="P7"><text:a xlink:type="simple" xlink:href="#__RefHeading___Toc5666_2625077907" text:style-name="Index_20_Link" text:visited-style-name="Index_20_Link">Fig 3. Succesful logout and redirect to login page<text:tab/>14</text:a></text:p>
          <text:p text:style-name="P7"><text:a xlink:type="simple" xlink:href="#__RefHeading___Toc5668_2625077907" text:style-name="Index_20_Link" text:visited-style-name="Index_20_Link">Fig 4. Add product protected<text:tab/>15</text:a></text:p>
          <text:p text:style-name="P5"><text:a xlink:type="simple" xlink:href="#__RefHeading___Toc5670_2625077907" text:style-name="Index_20_Link" text:visited-style-name="Index_20_Link">Week 5:Database Components &amp; CRUD<text:tab/>16</text:a></text:p>
          <text:p text:style-name="P7"><text:a xlink:type="simple" xlink:href="#__RefHeading___Toc5672_2625077907" text:style-name="Index_20_Link" text:visited-style-name="Index_20_Link">Fig 1. phpMyAdmin — week5db tables<text:tab/>16</text:a></text:p>
          <text:p text:style-name="P7"><text:a xlink:type="simple" xlink:href="#__RefHeading___Toc5674_2625077907" text:style-name="Index_20_Link" text:visited-style-name="Index_20_Link">Fig 2. Admin View. Full CRUD table with Edit/Delete buttons, admin logged in<text:tab/>16</text:a></text:p>
          <text:p text:style-name="P7"><text:a xlink:type="simple" xlink:href="#__RefHeading___Toc5676_2625077907" text:style-name="Index_20_Link" text:visited-style-name="Index_20_Link">Fig 3. Access Denied - Logged in as john_doe<text:tab/>17</text:a></text:p>
          <text:p text:style-name="P7"><text:a xlink:type="simple" xlink:href="#__RefHeading___Toc5678_2625077907" text:style-name="Index_20_Link" text:visited-style-name="Index_20_Link">Fig 4. Editing a product and succesful update<text:tab/>18</text:a></text:p>
          <text:p text:style-name="P7"><text:a xlink:type="simple" xlink:href="#__RefHeading___Toc5680_2625077907" text:style-name="Index_20_Link" text:visited-style-name="Index_20_Link">Fig 5. Delete product process<text:tab/>19</text:a></text:p>
          <text:p text:style-name="P7"><text:a xlink:type="simple" xlink:href="#__RefHeading___Toc5682_2625077907" text:style-name="Index_20_Link" text:visited-style-name="Index_20_Link">Fig 6. SQL Queries in phpMyAdmin<text:tab/>20</text:a></text:p>
          <text:p text:style-name="P7"><text:a xlink:type="simple" xlink:href="#__RefHeading___Toc5684_2625077907" text:style-name="Index_20_Link" text:visited-style-name="Index_20_Link">Fig 7. Session Info on Dashboard<text:tab/>20</text:a></text:p>
        </text:index-body>
      </text:table-of-content>
      <text:h text:style-name="P8" text:outline-level="1" loext:marker-style-name="T15"><text:span text:style-name="T16"/></text:h>
      <text:h text:style-name="P8" text:outline-level="1" loext:marker-style-name="T15"><text:soft-page-break/><text:span text:style-name="T15"/></text:h>
      <text:p text:style-name="P20" loext:marker-style-name="T2"/>
      <text:h text:style-name="Heading_20_1" text:outline-level="1"><text:bookmark-start text:name="__RefHeading___Toc5598_2625077907"/>Week 1: Local Environment Setup<text:bookmark-end text:name="__RefHeading___Toc5598_2625077907"/></text:h>
      <text:h text:style-name="Heading_20_2" text:outline-level="2"><text:bookmark-start text:name="__RefHeading___Toc5686_2625077907"/><text:span text:style-name="T14">Title : </text:span><text:span text:style-name="T17">Installation and Testing of Local Development Environment</text:span><text:bookmark-end text:name="__RefHeading___Toc5686_2625077907"/></text:h>
      <text:h text:style-name="Heading_20_2" text:outline-level="2"/>
      <text:h text:style-name="P8" text:outline-level="2" loext:marker-style-name="T14"><text:bookmark-start text:name="__RefHeading___Toc5604_2625077907"/><text:span text:style-name="T14">Required Evidence</text:span><text:bookmark-end text:name="__RefHeading___Toc5604_2625077907"/></text:h>
      <text:h text:style-name="P8" text:outline-level="3" loext:marker-style-name="T17"><text:bookmark-start text:name="__RefHeading___Toc5606_2625077907"/><text:span text:style-name="T17">Fig 1: Installation of XAMPP</text:span><text:bookmark-end text:name="__RefHeading___Toc5606_2625077907"/></text:h>
      <text:p text:style-name="P18" loext:marker-style-name="T2"><draw:frame draw:style-name="fr1" draw:name="Image1" text:anchor-type="char" svg:width="6.6929in" svg:height="4.5472in" draw:z-index="0"><draw:image xlink:href="Pictures/10000000000002BE000001DD8D2F1438.png" xlink:type="simple" xlink:show="embed" xlink:actuate="onLoad" draw:mime-type="image/png"/></draw:frame></text:p>
      <text:h text:style-name="P8" text:outline-level="3" loext:marker-style-name="T17"><text:bookmark-start text:name="__RefHeading___Toc5608_2625077907"/><draw:frame draw:style-name="fr2" draw:name="Image2" text:anchor-type="char" svg:x="-0.1354in" svg:y="0.2925in" svg:width="6.6929in" svg:height="4.5701in" draw:z-index="1"><draw:image xlink:href="Pictures/10000000000002A6000001CF826364CF.png" xlink:type="simple" xlink:show="embed" xlink:actuate="onLoad" draw:mime-type="image/png"/></draw:frame><text:soft-page-break/><text:span text:style-name="T17">Fig 2: Apache and MySQL Running</text:span><text:bookmark-end text:name="__RefHeading___Toc5608_2625077907"/></text:h>
      <text:p text:style-name="P18" loext:marker-style-name="T2"><text:span text:style-name="T2"/></text:p>
      <text:h text:style-name="P8" text:outline-level="3" loext:marker-style-name="T17"><text:bookmark-start text:name="__RefHeading___Toc5610_2625077907"/><text:span text:style-name="T17">Fig 3: Localhost Test Page</text:span><text:bookmark-end text:name="__RefHeading___Toc5610_2625077907"/></text:h>
      <text:p text:style-name="P18" loext:marker-style-name="T2"><draw:frame draw:style-name="fr3" draw:name="Image3" text:anchor-type="char" svg:width="6.6929in" svg:height="1.9626in" draw:z-index="2"><draw:image xlink:href="Pictures/100000000000051A0000017FB2E3AC50.png" xlink:type="simple" xlink:show="embed" xlink:actuate="onLoad" draw:mime-type="image/png"/></draw:frame><text:span text:style-name="T17"/></text:p>
      <text:p text:style-name="P18" loext:marker-style-name="T2"><text:span text:style-name="T2"/></text:p>
      <text:h text:style-name="P8" text:outline-level="3" loext:marker-style-name="T17"><text:bookmark-start text:name="__RefHeading___Toc5612_2625077907"/><text:span text:style-name="T17">Fig </text:span><text:span text:style-name="T18">4</text:span><text:span text:style-name="T17">: Database Connection Test</text:span><text:bookmark-end text:name="__RefHeading___Toc5612_2625077907"/></text:h>
      <text:p text:style-name="P18" loext:marker-style-name="T2"><text:span text:style-name="T2"/></text:p>
      <text:p text:style-name="P18" loext:marker-style-name="T2"><draw:frame draw:style-name="fr2" draw:name="Image4" text:anchor-type="char" svg:x="0.0728in" svg:y="-0.1028in" svg:width="6.6929in" svg:height="1.8516in" draw:z-index="3"><draw:image xlink:href="Pictures/10000000000005200000016B585E3A67.png" xlink:type="simple" xlink:show="embed" xlink:actuate="onLoad" draw:mime-type="image/png"/></draw:frame><text:soft-page-break/><text:span text:style-name="T2"/></text:p>
      <text:h text:style-name="P21" text:outline-level="2" loext:marker-style-name="T14"><text:bookmark-start text:name="__RefHeading___Toc5614_2625077907"/>I learnt XAMPP doesn’t easily recognise spacing in naming folders or files. The technologies used was html and sql.<text:bookmark-end text:name="__RefHeading___Toc5614_2625077907"/></text:h>
      <text:h text:style-name="Heading_20_1" text:outline-level="1"><text:bookmark-start text:name="__RefHeading___Toc5616_2625077907"/>Week 2: Wireframes and GUI Design<text:bookmark-end text:name="__RefHeading___Toc5616_2625077907"/></text:h>
      <text:h text:style-name="Heading_20_2" text:outline-level="2"><text:bookmark-start text:name="__RefHeading___Toc5690_2625077907"/><text:span text:style-name="T14">Title : </text:span><text:span text:style-name="T17">User Interface Planning and System Design</text:span><text:bookmark-end text:name="__RefHeading___Toc5690_2625077907"/></text:h>
      <text:h text:style-name="Heading_20_2" text:outline-level="2"/>
      <text:h text:style-name="P8" text:outline-level="2" loext:marker-style-name="T14"><text:bookmark-start text:name="__RefHeading___Toc5622_2625077907"/><text:span text:style-name="T14">Required Evidence</text:span><text:bookmark-end text:name="__RefHeading___Toc5622_2625077907"/></text:h>
      <text:h text:style-name="P8" text:outline-level="3" loext:marker-style-name="T17"><text:bookmark-start text:name="__RefHeading___Toc5624_2625077907"/><text:span text:style-name="T17">Fig 1: Hand-drawn Wireframe</text:span><text:bookmark-end text:name="__RefHeading___Toc5624_2625077907"/></text:h>
      <text:p text:style-name="P18" loext:marker-style-name="T2"><draw:frame draw:style-name="fr2" draw:name="Image6" text:anchor-type="char" svg:x="0.0835in" svg:y="-0.161in" svg:width="6.6929in" svg:height="3.4689in" draw:z-index="4"><draw:image xlink:href="Pictures/100000000000051E000002A7CCD81448.png" xlink:type="simple" xlink:show="embed" xlink:actuate="onLoad" draw:mime-type="image/png"/></draw:frame><text:span text:style-name="T2"/></text:p>
      <text:h text:style-name="P8" text:outline-level="3" loext:marker-style-name="T17"><text:bookmark-start text:name="__RefHeading___Toc5626_2625077907"/><draw:frame draw:style-name="fr2" draw:name="Image5" text:anchor-type="char" svg:x="0.0472in" svg:y="-0.3898in" svg:width="6.6929in" svg:height="3.4689in" draw:z-index="5"><draw:image xlink:href="Pictures/100000000000051D000002C3C076444B.png" xlink:type="simple" xlink:show="embed" xlink:actuate="onLoad" draw:mime-type="image/png"/></draw:frame><text:soft-page-break/><text:span text:style-name="T17">Fig 2: Dashboard Layout Design</text:span><text:bookmark-end text:name="__RefHeading___Toc5626_2625077907"/></text:h>
      <text:h text:style-name="P8" text:outline-level="3" loext:marker-style-name="T17"><draw:frame draw:style-name="fr1" draw:name="Image8" text:anchor-type="char" svg:width="6.6929in" svg:height="3.6374in" draw:z-index="7"><draw:image xlink:href="Pictures/100000000000051E000002C881797837.png" xlink:type="simple" xlink:show="embed" xlink:actuate="onLoad" draw:mime-type="image/png"/></draw:frame><draw:frame draw:style-name="fr2" draw:name="Image7" text:anchor-type="char" svg:x="0in" svg:y="3.6366in" svg:width="6.6929in" svg:height="3.6374in" draw:z-index="6"><draw:image xlink:href="Pictures/1000000000000522000002C97348388D.png" xlink:type="simple" xlink:show="embed" xlink:actuate="onLoad" draw:mime-type="image/png"/></draw:frame><text:span text:style-name="T17"/></text:h>
      <text:h text:style-name="P8" text:outline-level="3" loext:marker-style-name="T17"><text:bookmark-start text:name="__RefHeading___Toc5628_2625077907"/><text:soft-page-break/><text:span text:style-name="T17">Fig 3: Mobile View Mockup</text:span><text:bookmark-end text:name="__RefHeading___Toc5628_2625077907"/></text:h>
      <text:h text:style-name="P8" text:outline-level="3" loext:marker-style-name="T17"><draw:frame draw:style-name="fr2" draw:name="Image10" text:anchor-type="char" svg:x="1.211in" svg:y="-0.0937in" svg:width="4.0835in" svg:height="5.9898in" draw:z-index="9"><draw:image xlink:href="Pictures/10000000000001880000023F89450632.png" xlink:type="simple" xlink:show="embed" xlink:actuate="onLoad" draw:mime-type="image/png"/></draw:frame><text:span text:style-name="T17"/></text:h>
      <text:h text:style-name="P8" text:outline-level="3" loext:marker-style-name="T17"><text:span text:style-name="T17"/></text:h>
      <text:h text:style-name="P8" text:outline-level="3" loext:marker-style-name="T17"><text:span text:style-name="T17"/></text:h>
      <text:h text:style-name="P8" text:outline-level="3" loext:marker-style-name="T17"><text:span text:style-name="T17"/></text:h>
      <text:h text:style-name="P8" text:outline-level="3" loext:marker-style-name="T17"><text:span text:style-name="T17"/></text:h>
      <text:h text:style-name="P8" text:outline-level="3" loext:marker-style-name="T17"><text:span text:style-name="T17"/></text:h>
      <text:h text:style-name="P8" text:outline-level="3" loext:marker-style-name="T17"><text:span text:style-name="T17"/></text:h>
      <text:h text:style-name="P8" text:outline-level="3" loext:marker-style-name="T17"><text:span text:style-name="T17"/></text:h>
      <text:h text:style-name="P8" text:outline-level="3" loext:marker-style-name="T17"><text:span text:style-name="T17"/></text:h>
      <text:h text:style-name="P8" text:outline-level="3" loext:marker-style-name="T17"><text:span text:style-name="T17"/></text:h>
      <text:h text:style-name="P8" text:outline-level="3" loext:marker-style-name="T17"><text:bookmark-start text:name="__RefHeading___Toc5630_2625077907"/><draw:frame draw:style-name="fr2" draw:name="Image9" text:anchor-type="char" svg:x="-0.052in" svg:y="0.461in" svg:width="6.6929in" svg:height="3.6516in" draw:z-index="8"><draw:image xlink:href="Pictures/1000000000000524000002CEC2692D0A.png" xlink:type="simple" xlink:show="embed" xlink:actuate="onLoad" draw:mime-type="image/png"/></draw:frame><text:span text:style-name="T17">Fig 4: Color Theme and Navigation Structure</text:span><text:bookmark-end text:name="__RefHeading___Toc5630_2625077907"/></text:h>
      <text:h text:style-name="P8" text:outline-level="3" loext:marker-style-name="T17"><text:soft-page-break/><text:span text:style-name="T17"/></text:h>
      <text:h text:style-name="P8" text:outline-level="3" loext:marker-style-name="T17"><text:bookmark-start text:name="__RefHeading___Toc5632_2625077907"/><text:span text:style-name="T17">Fig 5: GUI Prototype in Figma</text:span><text:bookmark-end text:name="__RefHeading___Toc5632_2625077907"/></text:h>
      <text:p text:style-name="P20" loext:marker-style-name="T2"><draw:frame draw:style-name="fr1" draw:name="Image11" text:anchor-type="char" svg:width="6.6929in" svg:height="3.6146in" draw:z-index="10"><draw:image xlink:href="Pictures/100000000000051D000002C3C076444B.png" xlink:type="simple" xlink:show="embed" xlink:actuate="onLoad" draw:mime-type="image/png"/></draw:frame></text:p>
      <text:h text:style-name="P9" text:outline-level="2" loext:marker-style-name="T14"><text:bookmark-start text:name="__RefHeading___Toc5634_2625077907"/><text:span text:style-name="T14">Student Reflection</text:span><text:bookmark-end text:name="__RefHeading___Toc5634_2625077907"/></text:h>
      <text:h text:style-name="P9" text:outline-level="2" loext:marker-style-name="T14"><text:bookmark-start text:name="__RefHeading___Toc5636_2625077907"/><text:span text:style-name="T3">The design was selected due its simplicity and easy to use navigations. </text:span><text:span text:style-name="T2">User experience </text:span><text:span text:style-name="T3">was </text:span><text:span text:style-name="T2">consider</text:span><text:span text:style-name="T3">ed through easy naviagtion buttons and quick action buttons that guide the user.</text:span><text:bookmark-end text:name="__RefHeading___Toc5636_2625077907"/></text:h>
      <text:h text:style-name="P9" text:outline-level="2" loext:marker-style-name="T14"><text:bookmark-start text:name="__RefHeading___Toc5638_2625077907"/><text:span text:style-name="T3"><text:s/>Navigation flow was planned </text:span><text:span text:style-name="T4">based on user experience and quick product selection and check out. </text:span><text:span text:style-name="T2">Intended system users </text:span><text:span text:style-name="T4">will be prospective customers</text:span><text:bookmark-end text:name="__RefHeading___Toc5638_2625077907"/></text:h>
      <text:h text:style-name="Heading_20_1" text:outline-level="1"><text:bookmark-start text:name="__RefHeading___Toc5640_2625077907"/>Week 3: JavaScript and PHP Basics<text:bookmark-end text:name="__RefHeading___Toc5640_2625077907"/></text:h>
      <text:h text:style-name="Heading_20_2" text:outline-level="2"><text:bookmark-start text:name="__RefHeading___Toc5688_2625077907"/><text:span text:style-name="T14">Title : </text:span><text:span text:style-name="T17">Frontend Interaction and Backend Foundations</text:span><text:bookmark-end text:name="__RefHeading___Toc5688_2625077907"/></text:h>
      <text:p text:style-name="P20" loext:marker-style-name="T2"/>
      <text:h text:style-name="P8" text:outline-level="2" loext:marker-style-name="T14"><text:bookmark-start text:name="__RefHeading___Toc5646_2625077907"/><text:span text:style-name="T14">Required Evidence</text:span><text:bookmark-end text:name="__RefHeading___Toc5646_2625077907"/></text:h>
      <text:h text:style-name="P8" text:outline-level="3" loext:marker-style-name="T17"><text:bookmark-start text:name="__RefHeading___Toc5648_2625077907"/><text:span text:style-name="T17">Fig 1: JavaScript Form Validation</text:span><text:bookmark-end text:name="__RefHeading___Toc5648_2625077907"/></text:h>
      <text:h text:style-name="P8" text:outline-level="3" loext:marker-style-name="T17"><draw:frame draw:style-name="fr1" draw:name="Image12" text:anchor-type="char" svg:width="6.6929in" svg:height="6.428in" draw:z-index="13"><draw:image xlink:href="Pictures/10000000000002DC000002BFBCCBD7A6.png" xlink:type="simple" xlink:show="embed" xlink:actuate="onLoad" draw:mime-type="image/png"/></draw:frame><text:soft-page-break/><text:span text:style-name="T17"/></text:h>
      <text:h text:style-name="P8" text:outline-level="3" loext:marker-style-name="T17"><text:span text:style-name="T17"/></text:h>
      <text:h text:style-name="P8" text:outline-level="3" loext:marker-style-name="T17"><text:span text:style-name="T17"/></text:h>
      <text:h text:style-name="P8" text:outline-level="3" loext:marker-style-name="T17"><text:span text:style-name="T17"/></text:h>
      <text:h text:style-name="P8" text:outline-level="3" loext:marker-style-name="T17"><text:span text:style-name="T17"/></text:h>
      <text:h text:style-name="P8" text:outline-level="3" loext:marker-style-name="T17"><text:bookmark-start text:name="__RefHeading___Toc5650_2625077907"/><text:span text:style-name="T17">Fig 2: Password Strength Checker</text:span><text:bookmark-end text:name="__RefHeading___Toc5650_2625077907"/></text:h>
      <text:h text:style-name="P8" text:outline-level="3" loext:marker-style-name="T17"><draw:frame draw:style-name="fr2" draw:name="Image13" text:anchor-type="char" svg:x="0.6646in" svg:y="0.0882in" svg:width="4.948in" svg:height="6.8335in" draw:z-index="11"><draw:image xlink:href="Pictures/10000000000001DB000002908662F51E.png" xlink:type="simple" xlink:show="embed" xlink:actuate="onLoad" draw:mime-type="image/png"/></draw:frame><text:soft-page-break/><text:span text:style-name="T17"/></text:h>
      <text:h text:style-name="P8" text:outline-level="3" loext:marker-style-name="T17"><text:span text:style-name="T17"/></text:h>
      <text:h text:style-name="P8" text:outline-level="3" loext:marker-style-name="T17"><text:span text:style-name="T17"/></text:h>
      <text:h text:style-name="P8" text:outline-level="3" loext:marker-style-name="T17"><text:span text:style-name="T17"/></text:h>
      <text:h text:style-name="P8" text:outline-level="3" loext:marker-style-name="T17"><text:span text:style-name="T17"/></text:h>
      <text:h text:style-name="P8" text:outline-level="3" loext:marker-style-name="T17"><text:span text:style-name="T17"/></text:h>
      <text:h text:style-name="P8" text:outline-level="3" loext:marker-style-name="T17"><text:span text:style-name="T17"/></text:h>
      <text:h text:style-name="P8" text:outline-level="3" loext:marker-style-name="T17"><text:span text:style-name="T17"/></text:h>
      <text:h text:style-name="P8" text:outline-level="3" loext:marker-style-name="T17"><text:span text:style-name="T17"/></text:h>
      <text:h text:style-name="P8" text:outline-level="3" loext:marker-style-name="T17"><text:span text:style-name="T17"/></text:h>
      <text:h text:style-name="P8" text:outline-level="3" loext:marker-style-name="T17"><text:span text:style-name="T17"/></text:h>
      <text:h text:style-name="P8" text:outline-level="3" loext:marker-style-name="T17"><text:span text:style-name="T17"/></text:h>
      <text:h text:style-name="P8" text:outline-level="3" loext:marker-style-name="T17"><text:bookmark-start text:name="__RefHeading___Toc5652_2625077907"/><text:span text:style-name="T17">Fig 3: PHP Syntax Practice</text:span><text:bookmark-end text:name="__RefHeading___Toc5652_2625077907"/></text:h>
      <text:h text:style-name="P8" text:outline-level="3" loext:marker-style-name="T17"><draw:frame draw:style-name="fr2" draw:name="Image14" text:anchor-type="char" svg:x="-0.3543in" svg:y="-0.0319in" svg:width="6.6929in" svg:height="3.6555in" draw:z-index="12"><draw:image xlink:href="Pictures/1000000000000549000002E3D6916EE9.png" xlink:type="simple" xlink:show="embed" xlink:actuate="onLoad" draw:mime-type="image/png"/></draw:frame><text:soft-page-break/><text:span text:style-name="T17"/></text:h>
      <text:h text:style-name="P8" text:outline-level="3" loext:marker-style-name="T17"><text:bookmark-start text:name="__RefHeading___Toc5654_2625077907"/><text:span text:style-name="T17">Fig 4: Database Connection Script</text:span><text:bookmark-end text:name="__RefHeading___Toc5654_2625077907"/></text:h>
      <text:h text:style-name="P8" text:outline-level="3" loext:marker-style-name="T17"><draw:frame draw:style-name="fr1" draw:name="Image15" text:anchor-type="char" svg:width="6.6929in" svg:height="2.6984in" draw:z-index="14"><draw:image xlink:href="Pictures/100000000000055400000226A93F3C6B.png" xlink:type="simple" xlink:show="embed" xlink:actuate="onLoad" draw:mime-type="image/png"/></draw:frame><text:span text:style-name="T17"/></text:h>
      <text:h text:style-name="P8" text:outline-level="3" loext:marker-style-name="T17"><text:bookmark-start text:name="__RefHeading___Toc5656_2625077907"/><text:span text:style-name="T17">Fig 5: Dynamic User Input Handling</text:span><text:bookmark-end text:name="__RefHeading___Toc5656_2625077907"/></text:h>
      <text:h text:style-name="P8" text:outline-level="3" loext:marker-style-name="T17"><draw:frame draw:style-name="fr1" draw:name="Image16" text:anchor-type="char" svg:width="6.6929in" svg:height="3.1256in" draw:z-index="15"><draw:image xlink:href="Pictures/10000000000004A0000002290137BF54.png" xlink:type="simple" xlink:show="embed" xlink:actuate="onLoad" draw:mime-type="image/png"/></draw:frame><text:soft-page-break/><text:span text:style-name="T17"/></text:h>
      <text:p text:style-name="P20" loext:marker-style-name="T2"/>
      <text:h text:style-name="P8" text:outline-level="2" loext:marker-style-name="T14"><text:bookmark-start text:name="__RefHeading___Toc5658_2625077907"/><text:span text:style-name="T14">Student Reflection</text:span><text:bookmark-end text:name="__RefHeading___Toc5658_2625077907"/></text:h>
      <text:p text:style-name="P18" loext:marker-style-name="T2"><text:span text:style-name="T2">The login validation prevents users from submitting empty forms </text:span><text:span text:style-name="T6">from Fig 1</text:span><text:span text:style-name="T2">. PHP was used to process form data while MySQL stored the records. JavaScript improved user interaction </text:span><text:span text:style-name="T6">and allowed for dynamic user input handling. </text:span><text:span text:style-name="T2">before data reaches the server.</text:span></text:p>
      <text:h text:style-name="Heading_20_1" text:outline-level="1"><text:bookmark-start text:name="__RefHeading___Toc5660_2625077907"/><text:span text:style-name="T23">Week </text:span><text:span text:style-name="T24">4</text:span><text:span text:style-name="T23">: Server-Side Components.</text:span><text:bookmark-end text:name="__RefHeading___Toc5660_2625077907"/></text:h>
      <text:h text:style-name="P12" text:outline-level="3" loext:marker-style-name="T17"><text:bookmark-start text:name="__RefHeading___Toc5662_2625077907"/><draw:frame draw:style-name="fr2" draw:name="Image17" text:anchor-type="char" svg:x="-0.3752in" svg:y="0.4898in" svg:width="6.6929in" svg:height="4.5783in" draw:z-index="16"><draw:image xlink:href="Pictures/10000000000003470000023EEE4ED502.png" xlink:type="simple" xlink:show="embed" xlink:actuate="onLoad" draw:mime-type="image/png"/></draw:frame><text:soft-page-break/><text:span text:style-name="T19">Fig 1. Login form </text:span><text:bookmark-end text:name="__RefHeading___Toc5662_2625077907"/></text:h>
      <text:h text:style-name="P12" text:outline-level="3" loext:marker-style-name="T17"><text:bookmark-start text:name="__RefHeading___Toc5664_2625077907"/><draw:frame draw:style-name="fr2" draw:name="Image18" text:anchor-type="char" svg:x="-0.2291in" svg:y="5.2807in" svg:width="6.6929in" svg:height="5.4445in" draw:z-index="17"><draw:image xlink:href="Pictures/100000000000035A000002BACCCCC454.png" xlink:type="simple" xlink:show="embed" xlink:actuate="onLoad" draw:mime-type="image/png"/></draw:frame><text:span text:style-name="T19">Fig </text:span><text:span text:style-name="T20">2. <text:s/>Admin </text:span><text:span text:style-name="Source_20_Text"><text:span text:style-name="T28">dashboard</text:span></text:span><text:bookmark-end text:name="__RefHeading___Toc5664_2625077907"/></text:h>
      <text:h text:style-name="P12" text:outline-level="3" loext:marker-style-name="T17"><text:bookmark-start text:name="__RefHeading___Toc5666_2625077907"/><text:soft-page-break/><text:span text:style-name="Source_20_Text"><text:span text:style-name="T28">Fig 3. </text:span></text:span><text:span text:style-name="Source_20_Text"><text:span text:style-name="T29">Succesful logout and redirect to login page</text:span></text:span><text:bookmark-end text:name="__RefHeading___Toc5666_2625077907"/></text:h>
      <text:h text:style-name="P12" text:outline-level="3" loext:marker-style-name="T17"><draw:frame draw:style-name="fr4" draw:name="Image19" text:anchor-type="char" svg:width="5.9063in" svg:height="5.0311in" draw:z-index="18"><draw:image xlink:href="Pictures/1000000000000237000001E3F788C253.png" xlink:type="simple" xlink:show="embed" xlink:actuate="onLoad" draw:mime-type="image/png"/></draw:frame><text:span text:style-name="Source_20_Text"><text:span text:style-name="T29"/></text:span></text:h>
      <text:h text:style-name="P12" text:outline-level="3" loext:marker-style-name="T17"><text:bookmark-start text:name="__RefHeading___Toc5668_2625077907"/><draw:frame draw:style-name="fr2" draw:name="Image20" text:anchor-type="char" svg:x="-0.302in" svg:y="0.5807in" svg:width="6.6929in" svg:height="5.4654in" draw:z-index="19"><draw:image xlink:href="Pictures/10000000000003270000029312D65AB4.png" xlink:type="simple" xlink:show="embed" xlink:actuate="onLoad" draw:mime-type="image/png"/></draw:frame><text:soft-page-break/><text:span text:style-name="Source_20_Text"><text:span text:style-name="T28">Fig 4. </text:span></text:span><text:span text:style-name="Source_20_Text"><text:span text:style-name="T30">Add product protected</text:span></text:span><text:bookmark-end text:name="__RefHeading___Toc5668_2625077907"/></text:h>
      <text:h text:style-name="P12" text:outline-level="3" loext:marker-style-name="T17"><text:span text:style-name="Source_20_Text"><text:span text:style-name="T30"/></text:span></text:h>
      <text:p text:style-name="P22" loext:marker-style-name="T2"><text:span text:style-name="Source_20_Text"><text:span text:style-name="T8">Add product now only works when logged in otherwise redirects to log in page</text:span></text:span></text:p>
      <text:h text:style-name="Heading_20_1" text:outline-level="1"><text:bookmark-start text:name="__RefHeading___Toc5670_2625077907"/><text:soft-page-break/><text:span text:style-name="Source_20_Text"><text:span text:style-name="T23">Week </text:span></text:span><text:span text:style-name="Source_20_Text"><text:span text:style-name="T25">5</text:span></text:span><text:span text:style-name="Source_20_Text"><text:span text:style-name="T23">:</text:span></text:span><text:span text:style-name="Source_20_Text"><text:span text:style-name="T26">D</text:span></text:span><text:span text:style-name="Source_20_Text"><text:span text:style-name="Strong_20_Emphasis"><text:span text:style-name="T27">atabase Components &amp; CRUD</text:span></text:span></text:span><text:bookmark-end text:name="__RefHeading___Toc5670_2625077907"/></text:h>
      <text:h text:style-name="P12" text:outline-level="3" loext:marker-style-name="T17"><text:bookmark-start text:name="__RefHeading___Toc5672_2625077907"/><text:span text:style-name="Source_20_Text"><text:span text:style-name="T28">Fig </text:span></text:span><text:span text:style-name="Source_20_Text"><text:span text:style-name="T30">1</text:span></text:span><text:span text:style-name="Source_20_Text"><text:span text:style-name="T28">. phpMyAdmin — week5db tables<text:line-break/></text:span></text:span><draw:frame draw:style-name="fr2" draw:name="Image21" text:anchor-type="char" svg:x="0.1874in" svg:y="0.2811in" svg:width="6.6929in" svg:height="2.7602in" draw:z-index="20"><draw:image xlink:href="Pictures/100000000000039200000179F7903099.png" xlink:type="simple" xlink:show="embed" xlink:actuate="onLoad" draw:mime-type="image/png"/></draw:frame><text:bookmark-end text:name="__RefHeading___Toc5672_2625077907"/></text:h>
      <text:h text:style-name="P12" text:outline-level="3" loext:marker-style-name="T17"><text:bookmark-start text:name="__RefHeading___Toc5674_2625077907"/><text:span text:style-name="Source_20_Text"><text:span text:style-name="T28">Fig </text:span></text:span><text:span text:style-name="Source_20_Text"><text:span text:style-name="T30">2</text:span></text:span><text:span text:style-name="Source_20_Text"><text:span text:style-name="T28">. Admin View. Full CRUD table with Edit/Delete buttons, admin logged in</text:span></text:span><text:bookmark-end text:name="__RefHeading___Toc5674_2625077907"/></text:h>
      <text:h text:style-name="P12" text:outline-level="3" loext:marker-style-name="T17"><draw:frame draw:style-name="fr1" draw:name="Image22" text:anchor-type="char" svg:width="6.6929in" svg:height="4.7854in" draw:z-index="21"><draw:image xlink:href="Pictures/10000000000003A90000029E8E904996.png" xlink:type="simple" xlink:show="embed" xlink:actuate="onLoad" draw:mime-type="image/png"/></draw:frame><text:soft-page-break/><text:span text:style-name="Source_20_Text"><text:span text:style-name="T28"/></text:span></text:h>
      <text:h text:style-name="P13" text:outline-level="3" loext:marker-style-name="T17"><text:bookmark-start text:name="__RefHeading___Toc5676_2625077907"/><text:span text:style-name="Source_20_Text"><text:span text:style-name="T28">Fig </text:span></text:span><text:span text:style-name="Source_20_Text"><text:span text:style-name="T31">3</text:span></text:span><text:span text:style-name="Source_20_Text"><text:span text:style-name="T28">. Access Denied - Logged in as john_doe</text:span></text:span><text:bookmark-end text:name="__RefHeading___Toc5676_2625077907"/></text:h>
      <text:h text:style-name="P13" text:outline-level="3" loext:marker-style-name="T17"><draw:frame draw:style-name="fr1" draw:name="Image23" text:anchor-type="char" svg:width="6.6929in" svg:height="4.7917in" draw:z-index="22"><draw:image xlink:href="Pictures/10000000000003620000026C49E42D24.png" xlink:type="simple" xlink:show="embed" xlink:actuate="onLoad" draw:mime-type="image/png"/></draw:frame><text:soft-page-break/><text:span text:style-name="Source_20_Text"><text:span text:style-name="T28"/></text:span></text:h>
      <text:h text:style-name="P13" text:outline-level="3" loext:marker-style-name="T17"><text:bookmark-start text:name="__RefHeading___Toc5678_2625077907"/><draw:frame draw:style-name="fr2" draw:name="Image24" text:anchor-type="char" svg:x="-0.1665in" svg:y="0.6917in" svg:width="6.6929in" svg:height="4.722in" draw:z-index="23"><draw:image xlink:href="Pictures/10000000000003B70000029F3D7CBE04.png" xlink:type="simple" xlink:show="embed" xlink:actuate="onLoad" draw:mime-type="image/png"/></draw:frame><text:span text:style-name="Source_20_Text"><text:span text:style-name="T28">Fig </text:span></text:span><text:span text:style-name="Source_20_Text"><text:span text:style-name="T31">4</text:span></text:span><text:span text:style-name="Source_20_Text"><text:span text:style-name="T28">. </text:span></text:span><text:span text:style-name="Source_20_Text"><text:span text:style-name="T32">E</text:span></text:span><text:span text:style-name="Source_20_Text"><text:span text:style-name="T28">diting a product </text:span></text:span><text:span text:style-name="Source_20_Text"><text:span text:style-name="T32">and succesful update</text:span></text:span><text:bookmark-end text:name="__RefHeading___Toc5678_2625077907"/></text:h>
      <text:h text:style-name="P13" text:outline-level="3" loext:marker-style-name="T17"><draw:frame draw:style-name="fr3" draw:name="Image25" text:anchor-type="char" svg:width="6.6929in" svg:height="3.5181in" draw:z-index="24"><draw:image xlink:href="Pictures/10000000000003B9000001F5CD106A04.png" xlink:type="simple" xlink:show="embed" xlink:actuate="onLoad" draw:mime-type="image/png"/></draw:frame><text:soft-page-break/><text:span text:style-name="Source_20_Text"><text:span text:style-name="T28"/></text:span></text:h>
      <text:h text:style-name="P14" text:outline-level="3" loext:marker-style-name="T17"><text:bookmark-start text:name="__RefHeading___Toc5680_2625077907"/><text:span text:style-name="Source_20_Text"><text:span text:style-name="T28">Fig </text:span></text:span><text:span text:style-name="Source_20_Text"><text:span text:style-name="T32">5</text:span></text:span><text:span text:style-name="Source_20_Text"><text:span text:style-name="T28">. </text:span></text:span><text:span text:style-name="Source_20_Text"><text:span text:style-name="T33">Delete product process</text:span></text:span><text:bookmark-end text:name="__RefHeading___Toc5680_2625077907"/></text:h>
      <text:h text:style-name="P14" text:outline-level="3" loext:marker-style-name="T17"><draw:frame draw:style-name="fr3" draw:name="Image26" text:anchor-type="char" svg:width="6.6929in" svg:height="2.3665in" draw:z-index="25"><draw:image xlink:href="Pictures/10000000000003A50000014ABFD5C70F.png" xlink:type="simple" xlink:show="embed" xlink:actuate="onLoad" draw:mime-type="image/png"/></draw:frame><draw:frame draw:style-name="fr2" draw:name="Image27" text:anchor-type="char" svg:x="0in" svg:y="2.3661in" svg:width="6.6929in" svg:height="2.3528in" draw:z-index="26"><draw:image xlink:href="Pictures/10000000000003B60000014E73D69238.png" xlink:type="simple" xlink:show="embed" xlink:actuate="onLoad" draw:mime-type="image/png"/></draw:frame><text:span text:style-name="Source_20_Text"><text:span text:style-name="T33"/></text:span></text:h>
      <text:h text:style-name="P14" text:outline-level="3" loext:marker-style-name="T17"><text:bookmark-start text:name="__RefHeading___Toc5682_2625077907"/><text:soft-page-break/><text:span text:style-name="Source_20_Text"><text:span text:style-name="T28">Fig</text:span></text:span><draw:frame draw:style-name="fr2" draw:name="Image28" text:anchor-type="char" svg:x="0.3465in" svg:y="0.4654in" svg:width="3.8752in" svg:height="4.3335in" draw:z-index="27"><draw:image xlink:href="Pictures/1000000000000174000001A06758042E.png" xlink:type="simple" xlink:show="embed" xlink:actuate="onLoad" draw:mime-type="image/png"/></draw:frame><text:span text:style-name="Source_20_Text"><text:span text:style-name="T28"> </text:span></text:span><text:span text:style-name="Source_20_Text"><text:span text:style-name="T32">6</text:span></text:span><text:span text:style-name="Source_20_Text"><text:span text:style-name="T28">. SQL Queries in phpMyAdmin</text:span></text:span><text:bookmark-end text:name="__RefHeading___Toc5682_2625077907"/></text:h>
      <text:h text:style-name="P14" text:outline-level="3" loext:marker-style-name="T17"><text:span text:style-name="Source_20_Text"><text:span text:style-name="T28"/></text:span></text:h>
      <text:h text:style-name="P14" text:outline-level="3" loext:marker-style-name="T17"><text:span text:style-name="Source_20_Text"><text:span text:style-name="T28"/></text:span></text:h>
      <text:h text:style-name="P14" text:outline-level="3" loext:marker-style-name="T17"><text:span text:style-name="Source_20_Text"><text:span text:style-name="T28"/></text:span></text:h>
      <text:h text:style-name="P14" text:outline-level="3" loext:marker-style-name="T17"><text:span text:style-name="Source_20_Text"><text:span text:style-name="T28"/></text:span></text:h>
      <text:h text:style-name="P14" text:outline-level="3" loext:marker-style-name="T17"><text:span text:style-name="Source_20_Text"><text:span text:style-name="T28"/></text:span></text:h>
      <text:h text:style-name="P14" text:outline-level="3" loext:marker-style-name="T17"><text:span text:style-name="Source_20_Text"><text:span text:style-name="T28"/></text:span></text:h>
      <text:h text:style-name="P14" text:outline-level="3" loext:marker-style-name="T17"><text:span text:style-name="Source_20_Text"><text:span text:style-name="T28"/></text:span></text:h>
      <text:h text:style-name="P14" text:outline-level="3" loext:marker-style-name="T17"><text:span text:style-name="Source_20_Text"><text:span text:style-name="T28"/></text:span></text:h>
      <text:h text:style-name="P14" text:outline-level="3" loext:marker-style-name="T17"><text:bookmark-start text:name="__RefHeading___Toc5684_2625077907"/><text:span text:style-name="Source_20_Text"><text:span text:style-name="T28">Fig </text:span></text:span><text:span text:style-name="Source_20_Text"><text:span text:style-name="T32">7</text:span></text:span><text:span text:style-name="Source_20_Text"><text:span text:style-name="T28">. Session Info on Dashboard</text:span></text:span><text:bookmark-end text:name="__RefHeading___Toc5684_2625077907"/></text:h>
      <text:h text:style-name="P14" text:outline-level="3" loext:marker-style-name="T17"><draw:frame draw:style-name="fr1" draw:name="Image29" text:anchor-type="char" svg:width="6.6929in" svg:height="3.722in" draw:z-index="28"><draw:image xlink:href="Pictures/100000000000042C00000252FE86C47E.png" xlink:type="simple" xlink:show="embed" xlink:actuate="onLoad" draw:mime-type="image/png"/></draw:frame><text:span text:style-name="Source_20_Text"><text:span text:style-name="T28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4T10:48:41.731727671</meta:creation-date>
    <dc:date>2026-06-05T13:22:17.377991553</dc:date>
    <meta:editing-duration>PT11M6S</meta:editing-duration>
    <meta:editing-cycles>2</meta:editing-cycles>
    <meta:generator>LibreOffice/24.2.7.2$Linux_X86_64 LibreOffice_project/420$Build-2</meta:generator>
    <meta:document-statistic meta:table-count="0" meta:image-count="29" meta:object-count="0" meta:page-count="20" meta:paragraph-count="103" meta:word-count="719" meta:character-count="4251" meta:non-whitespace-character-count="3630"/>
  </office:meta>
</office:document-meta>
</file>